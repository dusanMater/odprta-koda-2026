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 svg:panose-1="2 11 5 2 4 5 4 2 2 4"/>
    <style:font-face style:name="Roboto Mono" svg:font-family="Roboto Mono" style:font-family-generic="modern" style:font-pitch="fixed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T2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3" style:parent-style-name="HTMLCode" style:family="text">
      <style:text-properties style:font-name="Roboto Mono" style:font-name-asian="Aptos" fo:color="#37474F" fo:font-size="9.5pt" style:font-size-asian="9.5pt" style:font-size-complex="9.5pt" fo:language="en" fo:country="GB"/>
    </style:style>
    <style:style style:name="T4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5" style:parent-style-name="HTMLCode" style:family="text">
      <style:text-properties style:font-name="Roboto Mono" style:font-name-asian="Aptos" fo:color="#37474F" fo:font-size="9.5pt" style:font-size-asian="9.5pt" style:font-size-complex="9.5pt" fo:language="en" fo:country="GB"/>
    </style:style>
    <style:style style:name="T6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7" style:parent-style-name="HTMLCode" style:family="text">
      <style:text-properties style:font-name="Roboto Mono" style:font-name-asian="Aptos" fo:color="#37474F" fo:font-size="9.5pt" style:font-size-asian="9.5pt" style:font-size-complex="9.5pt" fo:language="en" fo:country="GB"/>
    </style:style>
    <style:style style:name="T8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9" style:parent-style-name="HTMLCode" style:family="text">
      <style:text-properties style:font-name="Roboto Mono" style:font-name-asian="Aptos" fo:color="#37474F" fo:font-size="9.5pt" style:font-size-asian="9.5pt" style:font-size-complex="9.5pt" fo:language="en" fo:country="GB"/>
    </style:style>
    <style:style style:name="T10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11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12" style:parent-style-name="HTMLCode" style:family="text">
      <style:text-properties style:font-name="Roboto Mono" style:font-name-asian="Aptos" fo:color="#37474F" fo:font-size="9.5pt" style:font-size-asian="9.5pt" style:font-size-complex="9.5pt" fo:language="en" fo:country="GB"/>
    </style:style>
    <style:style style:name="T13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language="en" fo:country="GB"/>
    </style:style>
    <style:style style:name="P16" style:parent-style-name="NormalWeb" style:family="paragraph">
      <style:paragraph-properties fo:margin-top="0.1666in" fo:margin-bottom="0.1666in" fo:background-color="#FFFFFF">
        <style:background-fill draw:fill="solid" draw:fill-color="#FFFFFF"/>
      </style:paragraph-properties>
    </style:style>
    <style:style style:name="T17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18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19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20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21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22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23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24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25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26" style:parent-style-name="DefaultParagraphFont" style:family="text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language="en" fo:country="GB"/>
    </style:style>
    <style:style style:name="T27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28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29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30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31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32" style:parent-style-name="DefaultParagraphFont" style:family="text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language="en" fo:country="GB"/>
    </style:style>
    <style:style style:name="T33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34" style:parent-style-name="HTMLCode" style:family="text">
      <style:text-properties style:font-name="Roboto Mono" fo:color="#37474F" fo:font-size="9.5pt" style:font-size-asian="9.5pt" style:font-size-complex="9.5pt" fo:language="en" fo:country="GB"/>
    </style:style>
    <style:style style:name="T35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39" style:parent-style-name="Emphasis" style:family="text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background-color="#FFFF00" fo:language="en" fo:country="GB"/>
    </style:style>
    <style:style style:name="T40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41" style:parent-style-name="Emphasis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42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43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44" style:parent-style-name="Strong" style:family="text">
      <style:text-properties style:font-name="Noto Sans" style:font-name-complex="Noto Sans" fo:color="#212124" fo:font-size="10.5pt" style:font-size-asian="10.5pt" style:font-size-complex="10.5pt" fo:background-color="#E6F4EA" fo:language="en" fo:country="GB"/>
    </style:style>
    <style:style style:name="T45" style:parent-style-name="DefaultParagraphFont" style:family="text">
      <style:text-properties style:font-name="Noto Sans" style:font-name-complex="Noto Sans" fo:color="#212124" fo:font-size="10.5pt" style:font-size-asian="10.5pt" style:font-size-complex="10.5pt" fo:background-color="#E6F4EA" fo:language="en" fo:country="GB"/>
    </style:style>
    <style:style style:name="T46" style:parent-style-name="DefaultParagraphFont" style:family="text">
      <style:text-properties style:font-name="Noto Sans" style:font-name-complex="Noto Sans" fo:color="#212124" fo:font-size="10.5pt" style:font-size-asian="10.5pt" style:font-size-complex="10.5pt" fo:background-color="#E6F4EA" fo:language="en" fo:country="GB"/>
    </style:style>
    <style:style style:name="P47" style:parent-style-name="Normal" style:family="paragraph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background-color="#FFFFFF" fo:language="en" fo:country="GB"/>
    </style:style>
    <style:style style:name="T48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49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00" fo:language="en" fo:country="GB"/>
    </style:style>
    <style:style style:name="T50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1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2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53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54" style:parent-style-name="DefaultParagraphFont" style:family="text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background-color="#FFFFFF" fo:language="en" fo:country="GB"/>
    </style:style>
    <style:style style:name="T55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T56" style:parent-style-name="DefaultParagraphFont" style:family="text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background-color="#FFFFFF" fo:language="en" fo:country="GB"/>
    </style:style>
    <style:style style:name="T57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8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9" style:parent-style-name="Normal" style:family="paragraph">
      <style:text-properties style:font-name="Noto Sans" style:font-name-complex="Noto Sans" fo:font-weight="bold" style:font-weight-asian="bold" style:font-weight-complex="bold" fo:color="#4E5256" fo:font-size="10.5pt" style:font-size-asian="10.5pt" style:font-size-complex="10.5pt" fo:background-color="#FFFFFF" fo:language="en" fo:country="GB"/>
    </style:style>
    <style:style style:name="P60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61" style:parent-style-name="Normal" style:list-style-name="LFO1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62" style:parent-style-name="Normal" style:list-style-name="LFO1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63" style:parent-style-name="NormalWeb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P64" style:parent-style-name="NormalWeb" style:family="paragraph">
      <style:paragraph-properties fo:margin-top="0.1666in" fo:margin-bottom="0.1666in" fo:background-color="#FFFFFF">
        <style:background-fill draw:fill="solid" draw:fill-color="#FFFFFF"/>
      </style:paragraph-properties>
    </style:style>
    <style:style style:name="T65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66" style:parent-style-name="Emphasis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67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68" style:parent-style-name="Emphasis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T69" style:parent-style-name="DefaultParagraphFont" style:family="text">
      <style:text-properties style:font-name="Noto Sans" style:font-name-complex="Noto Sans" fo:color="#4E5256" fo:font-size="10.5pt" style:font-size-asian="10.5pt" style:font-size-complex="10.5pt" fo:language="en" fo:country="GB"/>
    </style:style>
    <style:style style:name="P70" style:parent-style-name="NormalWeb" style:family="paragraph">
      <style:paragraph-properties fo:margin-top="0.0833in" fo:margin-bottom="0.0833in"/>
    </style:style>
    <style:style style:name="T71" style:parent-style-name="Strong" style:family="text">
      <style:text-properties fo:language="en" fo:country="GB"/>
    </style:style>
    <style:style style:name="T72" style:parent-style-name="DefaultParagraphFont" style:family="text">
      <style:text-properties fo:language="en" fo:country="GB"/>
    </style:style>
    <style:style style:name="T73" style:parent-style-name="DefaultParagraphFont" style:family="text">
      <style:text-properties fo:font-weight="bold" style:font-weight-asian="bold" style:font-weight-complex="bold"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DefaultParagraphFont" style:family="text">
      <style:text-properties fo:font-weight="bold" style:font-weight-asian="bold" style:font-weight-complex="bold" fo:language="en" fo:country="GB"/>
    </style:style>
    <style:style style:name="T76" style:parent-style-name="DefaultParagraphFont" style:family="text">
      <style:text-properties fo:language="en" fo:country="GB"/>
    </style:style>
    <style:style style:name="T77" style:parent-style-name="DefaultParagraphFont" style:family="text">
      <style:text-properties style:font-name="Noto Sans" style:font-name-complex="Noto Sans" fo:color="#4E5256" fo:font-size="10.5pt" style:font-size-asian="10.5pt" style:font-size-complex="10.5pt" fo:background-color="#FFFF00"/>
    </style:style>
    <style:style style:name="P78" style:parent-style-name="Normal" style:family="paragraph">
      <style:paragraph-properties fo:margin-top="0.1666in" fo:margin-bottom="0.1666in" fo:line-height="100%" fo:background-color="#FFFFFF">
        <style:background-fill draw:fill="solid" draw:fill-color="#FFFFFF"/>
      </style:paragraph-properties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P79" style:parent-style-name="Normal" style:list-style-name="LFO2" style:family="paragraph">
      <style:paragraph-properties fo:margin-top="0.0833in" fo:margin-bottom="0.0833in" fo:line-height="100%" fo:background-color="#FFFFFF">
        <style:background-fill draw:fill="solid" draw:fill-color="#FFFFFF"/>
      </style:paragraph-properties>
    </style:style>
    <style:style style:name="T80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T81" style:parent-style-name="DefaultParagraphFont" style:family="text">
      <style:text-properties style:font-name="Roboto Mono" style:font-name-asian="Times New Roman" style:font-name-complex="Courier New" fo:font-weight="bold" style:font-weight-asian="bold" style:font-weight-complex="bold" fo:color="#37474F" style:letter-kerning="false" fo:font-size="9.5pt" style:font-size-asian="9.5pt" style:font-size-complex="9.5pt" style:language-asian="sl" style:country-asian="SI"/>
    </style:style>
    <style:style style:name="T82" style:parent-style-name="DefaultParagraphFont" style:family="text">
      <style:text-properties style:font-name="Roboto Mono" style:font-name-asian="Times New Roman" style:font-name-complex="Courier New" fo:color="#37474F" style:letter-kerning="false" fo:font-size="9.5pt" style:font-size-asian="9.5pt" style:font-size-complex="9.5pt" style:language-asian="sl" style:country-asian="SI"/>
    </style:style>
    <style:style style:name="T83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T84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P85" style:parent-style-name="Normal" style:list-style-name="LFO2" style:family="paragraph">
      <style:paragraph-properties fo:margin-top="0.0833in" fo:margin-bottom="0.0833in" fo:line-height="100%" fo:background-color="#FFFFFF">
        <style:background-fill draw:fill="solid" draw:fill-color="#FFFFFF"/>
      </style:paragraph-properties>
    </style:style>
    <style:style style:name="T86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T87" style:parent-style-name="DefaultParagraphFont" style:family="text">
      <style:text-properties style:font-name="Roboto Mono" style:font-name-asian="Times New Roman" style:font-name-complex="Courier New" fo:font-weight="bold" style:font-weight-asian="bold" style:font-weight-complex="bold" fo:color="#37474F" style:letter-kerning="false" fo:font-size="9.5pt" style:font-size-asian="9.5pt" style:font-size-complex="9.5pt" style:language-asian="sl" style:country-asian="SI"/>
    </style:style>
    <style:style style:name="T88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T89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fo:background-color="#FFFF00" style:language-asian="sl" style:country-asian="SI"/>
    </style:style>
    <style:style style:name="T90" style:parent-style-name="DefaultParagraphFont" style:family="text">
      <style:text-properties style:font-name="Noto Sans" style:font-name-asian="Times New Roman" style:font-name-complex="Noto Sans" fo:color="#4E5256" style:letter-kerning="false" fo:font-size="10.5pt" style:font-size-asian="10.5pt" style:font-size-complex="10.5pt" style:language-asian="sl" style:country-asian="SI"/>
    </style:style>
    <style:style style:name="TableColumn92" style:family="table-column">
      <style:table-column-properties style:column-width="3.9375in"/>
    </style:style>
    <style:style style:name="TableColumn93" style:family="table-column">
      <style:table-column-properties style:column-width="4.1347in"/>
    </style:style>
    <style:style style:name="Table91" style:family="table" style:master-page-name="MP1">
      <style:table-properties style:width="8.0722in" fo:margin-left="-0.3972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break-before="page" fo:margin-bottom="0in" fo:line-height="100%"/>
      <style:text-properties style:font-name="Courier New" style:font-name-complex="Courier New" fo:font-weight="bold" style:font-weight-asian="bold" style:font-weight-complex="bold" fo:color="#4E5256" fo:font-size="7pt" style:font-size-asian="7pt" style:font-size-complex="7pt" fo:background-color="#FFFFFF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4E5256" fo:font-size="7pt" style:font-size-asian="7pt" style:font-size-complex="7pt" fo:background-color="#FFFFFF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0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4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1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6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1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1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2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1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3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3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3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3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4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4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48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4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0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5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59" style:parent-style-name="DefaultParagraphFont" style:family="text">
      <style:text-properties style:font-name="Courier New" style:font-name-complex="Courier New" fo:color="#EE0000" fo:font-size="7pt" style:font-size-asian="7pt" style:font-size-complex="7pt" fo:background-color="#FFFF00"/>
    </style:style>
    <style:style style:name="T160" style:parent-style-name="DefaultParagraphFont" style:family="text">
      <style:text-properties style:font-name="Courier New" style:font-name-complex="Courier New" fo:color="#EE0000" fo:font-size="7pt" style:font-size-asian="7pt" style:font-size-complex="7pt" fo:background-color="#FFFFFF"/>
    </style:style>
    <style:style style:name="T16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7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6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69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7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7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88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8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3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9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7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19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19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6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0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08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0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1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2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2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23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2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25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2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2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3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2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4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6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4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48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4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5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1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6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3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6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6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7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/>
    </style:style>
    <style:style style:name="P274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/>
    </style:style>
    <style:style style:name="P275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7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79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8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4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8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88" style:parent-style-name="DefaultParagraphFont" style:family="text">
      <style:text-properties style:font-name="Courier New" style:font-name-complex="Courier New" fo:font-style="italic" style:font-style-asian="italic" style:font-style-complex="italic" fo:color="#4E5256" fo:font-size="7pt" style:font-size-asian="7pt" style:font-size-complex="7pt" fo:background-color="#FFFFFF"/>
    </style:style>
    <style:style style:name="T28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29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0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0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0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0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00"/>
    </style:style>
    <style:style style:name="T30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1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00FF"/>
    </style:style>
    <style:style style:name="T31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313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1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1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1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1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00"/>
    </style:style>
    <style:style style:name="T32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2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3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4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00FF"/>
    </style:style>
    <style:style style:name="T325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6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7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8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29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30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T331" style:parent-style-name="DefaultParagraphFont" style:family="text">
      <style:text-properties style:font-name="Courier New" style:font-name-complex="Courier New" fo:color="#4E5256" fo:font-size="7pt" style:font-size-asian="7pt" style:font-size-complex="7pt" fo:background-color="#FFFFFF"/>
    </style:style>
    <style:style style:name="P332" style:parent-style-name="Normal" style:family="paragraph">
      <style:paragraph-properties fo:margin-bottom="0in" fo:line-height="100%"/>
      <style:text-properties style:font-name="Courier New" style:font-name-complex="Courier New" fo:color="#4E5256" fo:font-size="7pt" style:font-size-asian="7pt" style:font-size-complex="7pt" fo:background-color="#FFFFFF" fo:language="en" fo:country="GB"/>
    </style:style>
    <style:style style:name="P333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334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335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336" style:parent-style-name="Normal" style:master-page-name="MP2" style:family="paragraph">
      <style:paragraph-properties fo:break-before="page"/>
      <style:text-properties fo:font-weight="bold" style:font-weight-asian="bold" style:font-weight-complex="bold" style:language-asian="sl" style:country-asian="SI"/>
    </style:style>
    <style:style style:name="TableColumn338" style:family="table-column">
      <style:table-column-properties style:column-width="2.9527in"/>
    </style:style>
    <style:style style:name="Table337" style:family="table">
      <style:table-properties style:width="2.9527in" fo:margin-left="-0.3972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top="0.0694in" fo:margin-bottom="0.0694in" fo:line-height="100%"/>
      <style:text-properties style:font-name="Courier New" style:font-name-asian="Times New Roman" style:font-name-complex="Courier New" fo:font-size="9pt" style:font-size-asian="9pt" style:font-size-complex="9pt" style:language-asian="sl" style:country-asian="SI"/>
    </style:style>
    <style:style style:name="P3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4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57" style:parent-style-name="Normal" style:family="paragraph">
      <style:paragraph-properties fo:margin-bottom="0in" fo:line-height="100%"/>
    </style:style>
    <style:style style:name="T35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5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69" style:parent-style-name="Normal" style:family="paragraph">
      <style:paragraph-properties fo:margin-bottom="0in" fo:line-height="100%"/>
    </style:style>
    <style:style style:name="T37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7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7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3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87" style:parent-style-name="Normal" style:family="paragraph">
      <style:paragraph-properties fo:margin-bottom="0in" fo:line-height="100%"/>
    </style:style>
    <style:style style:name="T38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8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sl" style:country-asian="SI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9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sl" style:country-asian="SI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3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2" style:parent-style-name="Normal" style:family="paragraph">
      <style:paragraph-properties fo:margin-bottom="0in" fo:line-height="100%"/>
    </style:style>
    <style:style style:name="T403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0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3" style:parent-style-name="Normal" style:family="paragraph">
      <style:paragraph-properties fo:margin-bottom="0in" fo:line-height="100%"/>
    </style:style>
    <style:style style:name="T41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2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3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35" style:parent-style-name="Normal" style:family="paragraph">
      <style:paragraph-properties fo:margin-top="0.0694in" fo:margin-bottom="0.0694in" fo:line-height="100%"/>
    </style:style>
    <style:style style:name="T43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T43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T43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43" style:parent-style-name="Normal" style:family="paragraph">
      <style:paragraph-properties fo:margin-bottom="0in" fo:line-height="100%"/>
    </style:style>
    <style:style style:name="T44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53" style:parent-style-name="Normal" style:family="paragraph">
      <style:paragraph-properties fo:margin-bottom="0in" fo:line-height="100%"/>
    </style:style>
    <style:style style:name="T45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1" style:parent-style-name="Normal" style:family="paragraph">
      <style:paragraph-properties fo:margin-bottom="0in" fo:line-height="100%"/>
    </style:style>
    <style:style style:name="T462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7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4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90" style:parent-style-name="Normal" style:family="paragraph">
      <style:paragraph-properties fo:margin-bottom="0in" fo:line-height="100%"/>
    </style:style>
    <style:style style:name="T491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9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493" style:parent-style-name="Normal" style:family="paragraph">
      <style:paragraph-properties fo:margin-top="0.0694in" fo:margin-bottom="0.0694in" fo:line-height="100%"/>
    </style:style>
    <style:style style:name="T49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T49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T49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9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49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5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3" style:parent-style-name="Normal" style:family="paragraph">
      <style:paragraph-properties fo:margin-bottom="0in" fo:line-height="100%"/>
    </style:style>
    <style:style style:name="T50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sl" style:country-asian="SI"/>
    </style:style>
    <style:style style:name="P5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09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/>
    </style:style>
    <style:style style:name="P5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/>
    </style:style>
    <style:style style:name="P517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18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19" style:parent-style-name="Normal" style:family="paragraph">
      <style:text-properties style:font-name="Noto Sans" style:font-name-complex="Noto Sans" fo:color="#4E5256" fo:font-size="10.5pt" style:font-size-asian="10.5pt" style:font-size-complex="10.5pt" fo:background-color="#FFFFFF" fo:language="en" fo:country="GB"/>
    </style:style>
    <style:style style:name="P520" style:parent-style-name="Normal" style:family="paragraph">
      <style:text-properties fo:font-weight="bold" style:font-weight-asian="bold" style:font-weight-complex="bold" fo:language="en" fo:country="GB"/>
    </style:style>
    <style:style style:name="T521" style:parent-style-name="DefaultParagraphFont" style:family="text">
      <style:text-properties fo:language="en" fo:country="GB"/>
    </style:style>
    <style:style style:name="T522" style:parent-style-name="Hyperlink" style:family="text">
      <style:text-properties fo:language="en" fo:country="GB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4167in solid #000000" fo:background-color="transparent" fo:clip="rect(0in, 0in, 0in, 0in)" style:shadow="0.02946in 0.02946in 0pc #000000"/>
    </style:style>
    <style:style style:family="graphic" style:name="a1" style:parent-style-name="Graphics">
      <style:graphic-properties fo:border="0.04167in solid #000000" fo:background-color="transparent" fo:clip="rect(0in, 0in, 0in, 0in)" style:shadow="0.02946in 0.02946in 0pc #000000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Kako narediti</text:p>
      <text:p text:style-name="Normal"><text:span text:style-name="T2">You need to access the </text:span><text:span text:style-name="T3">amountInput</text:span><text:span text:style-name="T4"> variable in the </text:span><text:span text:style-name="T5">TipTimeLayout()</text:span><text:span text:style-name="T6"> function to calculate and display the tip amount, but the </text:span><text:span text:style-name="T7">amountInput</text:span><text:span text:style-name="T8"> variable is the state of the text field defined in the<text:s/></text:span><text:span text:style-name="T9">EditNumberField()</text:span><text:span text:style-name="T10"><text:s/></text:span><text:span text:style-name="T11">composable function, so you can't call it from the<text:s/></text:span><text:span text:style-name="T12">TipTimeLayout()</text:span><text:span text:style-name="T13"><text:s/>function yet. This image illustrates the structure of the code:</text:span></text:p>
      <text:p text:style-name="P14"><text:span text:style-name="T15"><draw:frame draw:style-name="a0" draw:name="Picture 1" text:anchor-type="as-char" svg:x="0in" svg:y="0in" svg:width="3.62008in" svg:height="3.03389in" style:rel-width="scale" style:rel-height="scale"><draw:image xlink:href="media/image1.png" xlink:type="simple" xlink:show="embed" xlink:actuate="onLoad"/><svg:title/><svg:desc/></draw:frame></text:span></text:p>
      <text:p text:style-name="P16"><text:span text:style-name="T17">This structure won't let you display the tip amount in the new </text:span><text:span text:style-name="T18">Text</text:span><text:span text:style-name="T19"> composable because the<text:s/></text:span><text:span text:style-name="T20">Text</text:span><text:span text:style-name="T21"><text:s/>composable needs to access the </text:span><text:span text:style-name="T22">amount</text:span><text:span text:style-name="T23"> variable calculated from the<text:s/></text:span><text:span text:style-name="T24">amountInput</text:span><text:span text:style-name="T25"><text:s/>variable. You need to<text:s/></text:span><text:span text:style-name="T26">expose</text:span><text:span text:style-name="T27"><text:s/>the </text:span><text:span text:style-name="T28">amount</text:span><text:span text:style-name="T29"> variable to the<text:s/></text:span><text:span text:style-name="T30">TipTimeLayout()</text:span><text:span text:style-name="T31"><text:s/>function. This image illustrates the<text:s/></text:span><text:span text:style-name="T32">desired code structure</text:span><text:span text:style-name="T33">, which makes the </text:span><text:span text:style-name="T34">EditNumberField()</text:span><text:span text:style-name="T35"> composable stateless:</text:span></text:p>
      <text:p text:style-name="P36"><text:span text:style-name="T37"><draw:frame draw:style-name="a1" draw:name="Picture 2" text:anchor-type="as-char" svg:x="0in" svg:y="0in" svg:width="3.25234in" svg:height="3.34304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38">This pattern is called<text:s/></text:span><text:span text:style-name="T39">state hoisting</text:span><text:span text:style-name="T40">. In the next section, you </text:span><text:span text:style-name="T41">hoist</text:span><text:span text:style-name="T42">, or lift, the state from a composable to make it stateless.</text:span></text:p>
      <text:p text:style-name="P43"/>
      <text:p text:style-name="Normal"><text:span text:style-name="T44">Note:</text:span><text:span text:style-name="T45"><text:s/>A stateless composable is a composable that doesn't store its own state. It displays whatever state it's<text:s/></text:span><text:span text:style-name="T46">given as input arguments.</text:span></text:p>
      <text:p text:style-name="P47">Hoisting</text:p>
      <text:p text:style-name="Normal"><text:span text:style-name="T48">In this section, you learn how to decide where to define your state in a way that you can<text:s/></text:span><text:span text:style-name="T49">reuse and share your composables</text:span><text:span text:style-name="T50">.</text:span></text:p>
      <text:p text:style-name="P51"/>
      <text:p text:style-name="P52">In a composable function, you can define variables that hold state to display in the UI.<text:s/>For example, you defined the amountInput variable as state in the EditNumberField() composable.</text:p>
      <text:p text:style-name="Normal"><text:span text:style-name="T53">When your app becomes more complex and<text:s/></text:span><text:span text:style-name="T54">other composables need access to the state within</text:span><text:span text:style-name="T55"><text:s/>the EditNumberField() composable, you need to consider<text:s/></text:span><text:span text:style-name="T56">hoisting, or extracting, the state out</text:span><text:span text:style-name="T57"><text:s/>of the EditNumberField() composable function.</text:span></text:p>
      <text:p text:style-name="P58"/>
      <text:p text:style-name="P59">Understand stateful versus stateless composables</text:p>
      <text:p text:style-name="P60">You should hoist the state when you need to:</text:p>
      <text:list text:style-name="LFO1" text:continue-numbering="true">
        <text:list-item>
          <text:p text:style-name="P61">Share the state with multiple composable functions.</text:p>
        </text:list-item>
        <text:list-item>
          <text:p text:style-name="P62">Create a stateless composable that can be reused in your app.</text:p>
        </text:list-item>
      </text:list>
      <text:p text:style-name="P63">When you extract state from a composable function, the resulting composable function is called stateless. That is, composable functions can be made stateless by extracting state from them.</text:p>
      <text:p text:style-name="P64"><text:span text:style-name="T65">A </text:span><text:span text:style-name="T66">stateless</text:span><text:span text:style-name="T67"> composable is a composable that doesn't have a state, meaning it doesn't hold, define, or modify a new state. On the other hand, a </text:span><text:span text:style-name="T68">stateful</text:span><text:span text:style-name="T69"> composable is a composable that owns a piece of state that can change over time.</text:span></text:p>
      <text:p text:style-name="P70"><text:span text:style-name="T71">Note:</text:span><text:span text:style-name="T72"> In real apps,<text:s/></text:span><text:span text:style-name="T73">having a 100% stateless composable can be difficult to achieve</text:span><text:span text:style-name="T74"><text:s/>depending on the composable's responsibilities. You should design your composables in a way that they will own<text:s/></text:span><text:span text:style-name="T75">as little state as possible</text:span><text:span text:style-name="T76"><text:s/>and allow the state to be hoisted when it makes sense, by exposing it in the composable's API.</text:span></text:p>
      <text:p text:style-name="Normal"><text:span text:style-name="T77">State hoisting is a pattern of moving state to its caller to make a component stateless.</text:span></text:p>
      <text:p text:style-name="P78">When applied to composables, this often means introducing two parameters to the composable:</text:p>
      <text:list text:style-name="LFO2" text:continue-numbering="true">
        <text:list-item>
          <text:p text:style-name="P79"><text:span text:style-name="T80">A</text:span><text:span text:style-name="T81">value: T</text:span><text:span text:style-name="T82"><text:s/></text:span><text:span text:style-name="T83">parameter, which is the current<text:s/></text:span><text:span text:style-name="T84">value to display.</text:span></text:p>
        </text:list-item>
        <text:list-item>
          <text:p text:style-name="P85"><text:span text:style-name="T86">An<text:s/></text:span><text:span text:style-name="T87">onValueChange:(T)-&gt;Unit</text:span><text:span text:style-name="T88"><text:s/>–<text:s/></text:span><text:span text:style-name="T89">callback lambda</text:span><text:span text:style-name="T90">, which is triggered when the value changes so that the state can be updated elsewhere, such as when a user enters some text in the text box.</text:span></text:p>
        </text:list-item>
      </text:list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Prej</text:p>
          </table:table-cell>
          <table:table-cell table:style-name="TableCell97">
            <text:p text:style-name="P98">Kasneje</text:p>
          </table:table-cell>
        </table:table-row>
        <table:table-row table:style-name="TableRow99">
          <table:table-cell table:style-name="TableCell100">
            <text:p text:style-name="P101"><text:span text:style-name="T102">@Composable</text:span><text:span text:style-name="T103"><text:line-break/></text:span><text:span text:style-name="T104">fun<text:s/></text:span><text:span text:style-name="T105">TipTimeLayout()</text:span><text:span text:style-name="T106"><text:line-break/></text:span><text:span text:style-name="T107">{</text:span><text:span text:style-name="T108"><text:line-break/></text:span><text:span text:style-name="T109"><text:s text:c="2"/>// Composables</text:span><text:span text:style-name="T110"><text:line-break/></text:span><text:span text:style-name="T111"><text:s text:c="2"/>Column(</text:span><text:span text:style-name="T112"><text:line-break/></text:span><text:span text:style-name="T113"><text:s text:c="6"/>modifier = Modifier.</text:span><text:span text:style-name="T114">fillMaxSize</text:span><text:span text:style-name="T115">().</text:span><text:span text:style-name="T116">statusBarsPadding</text:span><text:span text:style-name="T117">(),</text:span><text:span text:style-name="T118"><text:line-break/></text:span><text:span text:style-name="T119"><text:s text:c="6"/>horizontalAlignment = Alignment.CenterHorizontally,</text:span><text:span text:style-name="T120"><text:line-break/></text:span><text:span text:style-name="T121"><text:s text:c="6"/>verticalArrangement = Arrangement.Top</text:span><text:span text:style-name="T122"><text:line-break/></text:span><text:span text:style-name="T123"><text:line-break/></text:span><text:span text:style-name="T124"><text:s text:c="2"/>) {</text:span><text:span text:style-name="T125"><text:line-break/></text:span><text:span text:style-name="T126"><text:s text:c="8"/>Text(</text:span></text:p>
            <text:p text:style-name="P127"><text:span text:style-name="T128"><text:s text:c="10"/>"Calculate Tip",</text:span><text:span text:style-name="T129"><text:line-break/></text:span><text:span text:style-name="T130"><text:s text:c="10"/>modifier = Modifier.</text:span><text:span text:style-name="T131">padding</text:span><text:span text:style-name="T132">(16.</text:span><text:span text:style-name="T133">dp</text:span><text:span text:style-name="T134">)</text:span></text:p>
            <text:p text:style-name="P135"><text:span text:style-name="T136"><text:s text:c="8"/>)</text:span><text:span text:style-name="T137"><text:line-break/></text:span><text:span text:style-name="T138"><text:line-break/></text:span><text:span text:style-name="T139"><text:s text:c="8"/>EditNumberField(</text:span><text:span text:style-name="T140"><text:line-break/></text:span><text:span text:style-name="T141"><text:s text:c="10"/>modifier = Modifier</text:span><text:span text:style-name="T142"><text:line-break/></text:span><text:span text:style-name="T143"><text:s text:c="14"/>.</text:span><text:span text:style-name="T144">fillMaxWidth</text:span><text:span text:style-name="T145">()</text:span><text:span text:style-name="T146"><text:line-break/></text:span><text:span text:style-name="T147"><text:s text:c="14"/>.</text:span><text:span text:style-name="T148">padding</text:span><text:span text:style-name="T149">(16.</text:span><text:span text:style-name="T150">dp</text:span><text:span text:style-name="T151">)</text:span><text:span text:style-name="T152"><text:line-break/></text:span><text:span text:style-name="T153"><text:s text:c="8"/>)</text:span></text:p>
            <text:p text:style-name="P154"><text:span text:style-name="T155"><text:line-break/></text:span><text:span text:style-name="T156"><text:s text:c="8"/>Text(</text:span><text:span text:style-name="T157"><text:line-break/></text:span><text:span text:style-name="T158"><text:s text:c="10"/>text="Tip amount:<text:s/></text:span><text:span text:style-name="T159">$tip</text:span><text:span text:style-name="T160"><text:s/></text:span><text:span text:style-name="T161">€",</text:span><text:span text:style-name="T162"><text:line-break/></text:span><text:span text:style-name="T163"><text:s text:c="10"/></text:span><text:span text:style-name="T164">fontWeight = FontWeight.Bold,</text:span><text:span text:style-name="T165"><text:line-break/></text:span><text:span text:style-name="T166"><text:s text:c="10"/>modifier = Modifier.</text:span><text:span text:style-name="T167">padding</text:span><text:span text:style-name="T168">(16.</text:span><text:span text:style-name="T169">dp</text:span><text:span text:style-name="T170">)</text:span><text:span text:style-name="T171"><text:line-break/></text:span><text:span text:style-name="T172"><text:s text:c="8"/>)</text:span><text:span text:style-name="T173"><text:line-break/></text:span><text:span text:style-name="T174"><text:s text:c="4"/>}</text:span><text:span text:style-name="T175"><text:line-break/></text:span><text:span text:style-name="T176">}</text:span></text:p>
          </table:table-cell>
          <table:table-cell table:style-name="TableCell177">
            <text:p text:style-name="P178"><text:span text:style-name="T179">@Composable</text:span><text:span text:style-name="T180"><text:line-break/></text:span><text:span text:style-name="T181">fun TipTimeLayout()</text:span><text:span text:style-name="T182"><text:line-break/></text:span><text:span text:style-name="T183">{</text:span><text:span text:style-name="T184"><text:line-break/></text:span><text:span text:style-name="T185"><text:s text:c="2"/>// states</text:span><text:span text:style-name="T186"><text:line-break/></text:span><text:span text:style-name="T187"><text:s text:c="2"/>var amountInput by remember <text:s/>{<text:s/></text:span><text:span text:style-name="T188">mutableStateOf</text:span><text:span text:style-name="T189">("") }</text:span><text:span text:style-name="T190"><text:line-break/></text:span><text:span text:style-name="T191"><text:line-break/></text:span><text:span text:style-name="T192"><text:s text:c="2"/>val amount <text:s/>= amountInput.</text:span><text:span text:style-name="T193">toDoubleOrNull</text:span><text:span text:style-name="T194">() ?: 0.0</text:span><text:span text:style-name="T195"><text:line-break/></text:span><text:span text:style-name="T196"><text:s text:c="2"/>val tip =<text:s/></text:span><text:span text:style-name="T197">calculateTip</text:span><text:span text:style-name="T198">(amount)</text:span><text:span text:style-name="T199"><text:line-break/></text:span><text:span text:style-name="T200"><text:line-break/></text:span><text:span text:style-name="T201"><text:s text:c="2"/>// Composables</text:span><text:span text:style-name="T202"><text:line-break/></text:span><text:span text:style-name="T203"><text:s text:c="2"/>Column(</text:span><text:span text:style-name="T204"><text:line-break/></text:span><text:span text:style-name="T205"><text:s text:c="6"/>modifier = Modifier.</text:span><text:span text:style-name="T206">fillMaxSize</text:span><text:span text:style-name="T207">().</text:span><text:span text:style-name="T208">statusBarsPadding</text:span><text:span text:style-name="T209">(),</text:span><text:span text:style-name="T210"><text:line-break/></text:span><text:span text:style-name="T211"><text:s text:c="6"/>horizontalAlignment = Alignment.CenterHorizontally,</text:span><text:span text:style-name="T212"><text:line-break/></text:span><text:span text:style-name="T213"><text:s text:c="6"/>verticalArrangement = Arrangement.Top</text:span><text:span text:style-name="T214"><text:line-break/></text:span><text:span text:style-name="T215"><text:line-break/></text:span><text:span text:style-name="T216"><text:s text:c="2"/>) {</text:span><text:span text:style-name="T217"><text:line-break/></text:span><text:span text:style-name="T218"><text:s text:c="8"/>Text(</text:span></text:p>
            <text:p text:style-name="P219"><text:span text:style-name="T220"><text:s text:c="10"/>"Calculate Tip",</text:span><text:span text:style-name="T221"><text:line-break/></text:span><text:span text:style-name="T222"><text:s text:c="10"/>modifier = Modifier.</text:span><text:span text:style-name="T223">padding</text:span><text:span text:style-name="T224">(16.</text:span><text:span text:style-name="T225">dp</text:span><text:span text:style-name="T226">)</text:span></text:p>
            <text:p text:style-name="P227"><text:span text:style-name="T228"><text:s text:c="8"/>)</text:span><text:span text:style-name="T229"><text:line-break/></text:span><text:span text:style-name="T230"><text:line-break/></text:span><text:span text:style-name="T231"><text:s text:c="8"/>EditNumberField(</text:span><text:span text:style-name="T232"><text:line-break/></text:span><text:span text:style-name="T233"><text:s text:c="10"/>value = amountInput,</text:span><text:span text:style-name="T234"><text:line-break/></text:span><text:span text:style-name="T235"><text:s text:c="10"/>onValueC = { amountInput = it }</text:span><text:span text:style-name="T236"><text:line-break/></text:span><text:span text:style-name="T237"><text:s text:c="10"/>},</text:span><text:span text:style-name="T238"><text:line-break/></text:span><text:span text:style-name="T239"><text:s text:c="10"/>modifier = Modifier</text:span><text:span text:style-name="T240"><text:line-break/></text:span><text:span text:style-name="T241"><text:s text:c="14"/>.</text:span><text:span text:style-name="T242">fillMaxWidth</text:span><text:span text:style-name="T243">()</text:span><text:span text:style-name="T244"><text:line-break/></text:span><text:span text:style-name="T245"><text:s text:c="14"/>.</text:span><text:span text:style-name="T246">padding</text:span><text:span text:style-name="T247">(16.</text:span><text:span text:style-name="T248">dp</text:span><text:span text:style-name="T249">)</text:span><text:span text:style-name="T250"><text:line-break/></text:span><text:span text:style-name="T251"><text:s text:c="8"/>)</text:span></text:p>
            <text:p text:style-name="P252"><text:span text:style-name="T253"><text:line-break/></text:span><text:span text:style-name="T254"><text:s text:c="8"/>Text(</text:span><text:span text:style-name="T255"><text:line-break/></text:span><text:span text:style-name="T256"><text:s text:c="10"/>text="Tip amount: $tip €",</text:span><text:span text:style-name="T257"><text:line-break/></text:span><text:span text:style-name="T258"><text:s text:c="10"/>fontWeight = FontWeight.Bold,</text:span><text:span text:style-name="T259"><text:line-break/></text:span><text:span text:style-name="T260"><text:s text:c="10"/>modifier = Modifier.</text:span><text:span text:style-name="T261">padding</text:span><text:span text:style-name="T262">(16.</text:span><text:span text:style-name="T263">dp</text:span><text:span text:style-name="T264">)</text:span><text:span text:style-name="T265"><text:line-break/></text:span><text:span text:style-name="T266"><text:s text:c="8"/>)</text:span><text:span text:style-name="T267"><text:line-break/></text:span><text:span text:style-name="T268"><text:s text:c="4"/>}</text:span><text:span text:style-name="T269"><text:line-break/></text:span><text:span text:style-name="T270">}</text:span></text:p>
          </table:table-cell>
        </table:table-row>
        <table:table-row table:style-name="TableRow271">
          <table:table-cell table:style-name="TableCell272">
            <text:p text:style-name="P273">fun EditNumberField(</text:p>
            <text:p text:style-name="P274"><text:s text:c="2"/>modifier: Modifier = Modifier</text:p>
            <text:p text:style-name="P275">) {</text:p>
            <text:p text:style-name="P276"><text:span text:style-name="T277"><text:s text:c="2"/>var<text:s/></text:span><text:span text:style-name="T278">vrednostStoritve by remember <text:s/>{<text:s/></text:span><text:span text:style-name="T279">mutableStateOf</text:span><text:span text:style-name="T280">("") }</text:span><text:span text:style-name="T281"><text:line-break/></text:span><text:span text:style-name="T282"><text:line-break/></text:span><text:span text:style-name="T283"><text:s text:c="2"/>val vrednost <text:s/>= vrednostStoritve.</text:span><text:span text:style-name="T284">toDoubleOrNull</text:span><text:span text:style-name="T285">() ?: 0.0</text:span><text:span text:style-name="T286"><text:line-break/></text:span><text:span text:style-name="T287"><text:s text:c="2"/>val napitnina =<text:s/></text:span><text:span text:style-name="T288">calculateTip</text:span><text:span text:style-name="T289">(vrednost)</text:span><text:span text:style-name="T290"><text:line-break/></text:span><text:span text:style-name="T291"><text:line-break/></text:span><text:span text:style-name="T292"><text:s text:c="2"/>TextField(</text:span><text:span text:style-name="T293"><text:line-break/></text:span><text:span text:style-name="T294"><text:s text:c="4"/>value = vrednostStoritve,</text:span><text:span text:style-name="T295"><text:line-break/></text:span><text:span text:style-name="T296"><text:s text:c="4"/>onValueChange = {vrednostStoritve = it},</text:span><text:span text:style-name="T297"><text:line-break/></text:span><text:span text:style-name="T298"><text:s text:c="4"/>modifier = modifier</text:span><text:span text:style-name="T299"><text:line-break/></text:span><text:span text:style-name="T300"><text:s text:c="2"/>)</text:span><text:span text:style-name="T301"><text:line-break/></text:span><text:span text:style-name="T302">}</text:span></text:p>
          </table:table-cell>
          <table:table-cell table:style-name="TableCell303">
            <text:p text:style-name="P304">@Composable<text:line-break/>fun EditNumberField(</text:p>
            <text:p text:style-name="P305"><text:span text:style-name="T306"><text:s text:c="2"/></text:span><text:span text:style-name="T307">value</text:span><text:span text:style-name="T308">:String,<text:s/></text:span></text:p>
            <text:p text:style-name="P309"><text:span text:style-name="T310"><text:s text:c="2"/></text:span><text:span text:style-name="T311">onValueC</text:span><text:span text:style-name="T312">:(String)-&gt;Unit,<text:s/></text:span></text:p>
            <text:p text:style-name="P313"><text:s text:c="2"/>modifier: Modifier = Modifier</text:p>
            <text:p text:style-name="P314"><text:span text:style-name="T315">) {</text:span><text:span text:style-name="T316"><text:line-break/></text:span><text:span text:style-name="T317"><text:s text:c="4"/>TextField(</text:span><text:span text:style-name="T318"><text:line-break/></text:span><text:span text:style-name="T319"><text:s text:c="8"/>value =<text:s/></text:span><text:span text:style-name="T320">value</text:span><text:span text:style-name="T321">,</text:span><text:span text:style-name="T322"><text:line-break/></text:span><text:span text:style-name="T323"><text:s text:c="8"/>onValueChange =<text:s/></text:span><text:span text:style-name="T324">onValueC</text:span><text:span text:style-name="T325">,</text:span><text:span text:style-name="T326"><text:line-break/></text:span><text:span text:style-name="T327"><text:s text:c="8"/>modifier = modifier</text:span><text:span text:style-name="T328"><text:line-break/></text:span><text:span text:style-name="T329"><text:s text:c="4"/>)</text:span><text:span text:style-name="T330"><text:line-break/></text:span><text:span text:style-name="T331">}</text:span></text:p>
            <text:p text:style-name="P332"/>
          </table:table-cell>
        </table:table-row>
      </table:table>
      <text:p text:style-name="P333"/>
      <text:p text:style-name="P334"/>
      <text:p text:style-name="P335"/>
      <text:p text:style-name="P336">Opis<text:s/>delovanja principa state hosting v zgornjem primeru!</text:p>
      <table:table table:style-name="Table337">
        <table:table-columns>
          <table:table-column table:style-name="TableColumn338"/>
        </table:table-columns>
        <table:table-row table:style-name="TableRow339">
          <table:table-cell table:style-name="TableCell340">
            <text:h text:style-name="P341" text:outline-level="1"/>
          </table:table-cell>
        </table:table-row>
      </table:table>
      <text:h text:style-name="P342" text:outline-level="1"/>
      <text:h text:style-name="P343" text:outline-level="1">1. Screen starts</text:h>
      <text:p text:style-name="P344">Android calls:</text:p>
      <text:p text:style-name="P345">TipTimeLayout()</text:p>
      <text:p text:style-name="P346">Compose begins initial composition.</text:p>
      <text:p text:style-name="P347"><text:span text:style-name="T348"><draw:custom-shape svg:x="0in" svg:y="0in" svg:width="45.51042in" svg:height="0.00139in" draw:id="id0" draw:style-name="a2" draw:name="Horizontal Line 198" text:anchor-type="as-char"><svg:title/><svg:desc/><draw:enhanced-geometry draw:type="non-primitive" svg:viewBox="0 0 21600 21600" draw:enhanced-path="M 0 0 L 21600 0 21600 21600 0 21600 Z N"/></draw:custom-shape></text:span></text:p>
      <text:h text:style-name="P349" text:outline-level="1">2. State is created</text:h>
      <text:p text:style-name="P350">var amountInput by remember {</text:p>
      <text:p text:style-name="P351"><text:s text:c="4"/>mutableStateOf("")</text:p>
      <text:p text:style-name="P352">}</text:p>
      <text:p text:style-name="P353">This creates state.</text:p>
      <text:p text:style-name="P354">Initially:</text:p>
      <text:p text:style-name="P355">amountInput = ""</text:p>
      <text:p text:style-name="P356">(empty string)</text:p>
      <text:p text:style-name="P357"><text:span text:style-name="T358"><draw:custom-shape svg:x="0in" svg:y="0in" svg:width="45.51042in" svg:height="0.00139in" draw:id="id1" draw:style-name="a3" draw:name="Horizontal Line 199" text:anchor-type="as-char"><svg:title/><svg:desc/><draw:enhanced-geometry draw:type="non-primitive" svg:viewBox="0 0 21600 21600" draw:enhanced-path="M 0 0 L 21600 0 21600 21600 0 21600 Z N"/></draw:custom-shape></text:span></text:p>
      <text:h text:style-name="P359" text:outline-level="1">3. amount is calculated</text:h>
      <text:p text:style-name="P360">val amount = amountInput.toDoubleOrNull() ?: 0.0</text:p>
      <text:p text:style-name="P361">Currently:</text:p>
      <text:p text:style-name="P362">amountInput = ""</text:p>
      <text:p text:style-name="P363">So:</text:p>
      <text:p text:style-name="P364">"".toDoubleOrNull()</text:p>
      <text:p text:style-name="P365">returns:</text:p>
      <text:p text:style-name="P366">null</text:p>
      <text:p text:style-name="P367">Therefore:</text:p>
      <text:p text:style-name="P368">amount = 0.0</text:p>
      <text:p text:style-name="P369"><text:span text:style-name="T370"><draw:custom-shape svg:x="0in" svg:y="0in" svg:width="45.51042in" svg:height="0.00139in" draw:id="id2" draw:style-name="a4" draw:name="Horizontal Line 200" text:anchor-type="as-char"><svg:title/><svg:desc/><draw:enhanced-geometry draw:type="non-primitive" svg:viewBox="0 0 21600 21600" draw:enhanced-path="M 0 0 L 21600 0 21600 21600 0 21600 Z N"/></draw:custom-shape></text:span></text:p>
      <text:h text:style-name="P371" text:outline-level="1">4. Tip is calculated</text:h>
      <text:p text:style-name="P372">val tip =<text:s/>calculateTip(amount)</text:p>
      <text:p text:style-name="P373">Now:</text:p>
      <text:p text:style-name="P374">calculateTip(0.0)</text:p>
      <text:p text:style-name="P375">returns:</text:p>
      <text:p text:style-name="P376">0.00</text:p>
      <text:p text:style-name="P377"><text:span text:style-name="T378"><draw:custom-shape svg:x="0in" svg:y="0in" svg:width="45.51042in" svg:height="0.00139in" draw:id="id3" draw:style-name="a5" draw:name="Horizontal Line 201" text:anchor-type="as-char"><svg:title/><svg:desc/><draw:enhanced-geometry draw:type="non-primitive" svg:viewBox="0 0 21600 21600" draw:enhanced-path="M 0 0 L 21600 0 21600 21600 0 21600 Z N"/></draw:custom-shape></text:span></text:p>
      <text:h text:style-name="P379" text:outline-level="1">5. EditNumberField is called</text:h>
      <text:p text:style-name="P380">Compose executes:</text:p>
      <text:p text:style-name="P381">EditNumberField(</text:p>
      <text:p text:style-name="P382"><text:s text:c="4"/>value = amountInput,</text:p>
      <text:p text:style-name="P383"><text:s text:c="4"/>{ amountInput = it }</text:p>
      <text:p text:style-name="P384">)</text:p>
      <text:p text:style-name="P385">VERY important.</text:p>
      <text:p text:style-name="P386">You are passing TWO things:</text:p>
      <text:p text:style-name="P387"><text:span text:style-name="T388"><draw:custom-shape svg:x="0in" svg:y="0in" svg:width="45.51042in" svg:height="0.00139in" draw:id="id4" draw:style-name="a6" draw:name="Horizontal Line 202" text:anchor-type="as-char"><svg:title/><svg:desc/><draw:enhanced-geometry draw:type="non-primitive" svg:viewBox="0 0 21600 21600" draw:enhanced-path="M 0 0 L 21600 0 21600 21600 0 21600 Z N"/></draw:custom-shape></text:span></text:p>
      <text:h text:style-name="P389" text:outline-level="2">A) current value</text:h>
      <text:p text:style-name="P390">value =<text:s/>amountInput</text:p>
      <text:p text:style-name="P391">Currently:</text:p>
      <text:p text:style-name="P392">""</text:p>
      <text:p text:style-name="P393"><text:span text:style-name="T394"><draw:custom-shape svg:x="0in" svg:y="0in" svg:width="45.51042in" svg:height="0.00139in" draw:id="id5" draw:style-name="a7" draw:name="Horizontal Line 203" text:anchor-type="as-char"><svg:title/><svg:desc/><draw:enhanced-geometry draw:type="non-primitive" svg:viewBox="0 0 21600 21600" draw:enhanced-path="M 0 0 L 21600 0 21600 21600 0 21600 Z N"/></draw:custom-shape></text:span></text:p>
      <text:h text:style-name="P395" text:outline-level="2">B) function/lambda</text:h>
      <text:p text:style-name="P396">{ amountInput = it }</text:p>
      <text:p text:style-name="P397">This is callback function.</text:p>
      <text:p text:style-name="P398">Equivalent to:</text:p>
      <text:p text:style-name="P399">onValueChange = { newText -&gt;</text:p>
      <text:p text:style-name="P400"><text:s text:c="4"/>amountInput = newText</text:p>
      <text:p text:style-name="P401">}</text:p>
      <text:p text:style-name="P402"><text:span text:style-name="T403"><draw:custom-shape svg:x="0in" svg:y="0in" svg:width="45.51042in" svg:height="0.00139in" draw:id="id6" draw:style-name="a8" draw:name="Horizontal Line 204" text:anchor-type="as-char"><svg:title/><svg:desc/><draw:enhanced-geometry draw:type="non-primitive" svg:viewBox="0 0 21600 21600" draw:enhanced-path="M 0 0 L 21600 0 21600 21600 0 21600 Z N"/></draw:custom-shape></text:span></text:p>
      <text:h text:style-name="P404" text:outline-level="1">6. Inside EditNumberField</text:h>
      <text:p text:style-name="P405">Compose enters:</text:p>
      <text:p text:style-name="P406">fun EditNumberField(</text:p>
      <text:p text:style-name="P407"><text:s text:c="4"/>value:String,</text:p>
      <text:p text:style-name="P408"><text:s text:c="4"/>onValueChange:(String)-&gt;Unit</text:p>
      <text:p text:style-name="P409">)</text:p>
      <text:p text:style-name="P410">Now local variables become:</text:p>
      <text:p text:style-name="P411">value = ""</text:p>
      <text:p text:style-name="P412">onValueChange = lambda function</text:p>
      <text:p text:style-name="P413"><text:span text:style-name="T414"><draw:custom-shape svg:x="0in" svg:y="0in" svg:width="45.51042in" svg:height="0.00139in" draw:id="id7" draw:style-name="a9" draw:name="Horizontal Line 205" text:anchor-type="as-char"><svg:title/><svg:desc/><draw:enhanced-geometry draw:type="non-primitive" svg:viewBox="0 0 21600 21600" draw:enhanced-path="M 0 0 L 21600 0 21600 21600 0 21600 Z N"/></draw:custom-shape></text:span></text:p>
      <text:h text:style-name="P415" text:outline-level="1">7. TextField is built</text:h>
      <text:p text:style-name="P416">TextField(</text:p>
      <text:p text:style-name="P417"><text:s text:c="4"/>value = value,</text:p>
      <text:p text:style-name="P418"><text:s text:c="4"/>onValueChange = onValueChange</text:p>
      <text:p text:style-name="P419">)</text:p>
      <text:p text:style-name="P420">Equivalent to:</text:p>
      <text:p text:style-name="P421">TextField(</text:p>
      <text:p text:style-name="P422"><text:s text:c="4"/>value = "",</text:p>
      <text:p text:style-name="P423"><text:s text:c="4"/>onValueChange = { amountInput = it }</text:p>
      <text:p text:style-name="P424">)</text:p>
      <text:p text:style-name="P425"><text:span text:style-name="T426"><draw:custom-shape svg:x="0in" svg:y="0in" svg:width="45.51042in" svg:height="0.00139in" draw:id="id8" draw:style-name="a10" draw:name="Horizontal Line 206" text:anchor-type="as-char"><svg:title/><svg:desc/><draw:enhanced-geometry draw:type="non-primitive" svg:viewBox="0 0 21600 21600" draw:enhanced-path="M 0 0 L 21600 0 21600 21600 0 21600 Z N"/></draw:custom-shape></text:span></text:p>
      <text:h text:style-name="P427" text:outline-level="1">NOW IMPORTANT PART</text:h>
      <text:h text:style-name="P428" text:outline-level="1">User types "5"</text:h>
      <text:p text:style-name="P429">Android keyboard sends:</text:p>
      <text:p text:style-name="P430">"5"</text:p>
      <text:p text:style-name="P431">to:</text:p>
      <text:p text:style-name="P432">TextField.onValueChange</text:p>
      <text:p text:style-name="P433">So this executes:</text:p>
      <text:p text:style-name="P434">onValueChange("5")</text:p>
      <text:p text:style-name="P435"><text:span text:style-name="T436">But what IS<text:s/></text:span><text:span text:style-name="T437">onValueChange</text:span><text:span text:style-name="T438">?</text:span></text:p>
      <text:p text:style-name="P439">It is THIS lambda:</text:p>
      <text:p text:style-name="P440">{ amountInput = it }</text:p>
      <text:p text:style-name="P441">Therefore:</text:p>
      <text:p text:style-name="P442">amountInput = "5"</text:p>
      <text:p text:style-name="P443"><text:span text:style-name="T444"><draw:custom-shape svg:x="0in" svg:y="0in" svg:width="45.51042in" svg:height="0.00139in" draw:id="id9" draw:style-name="a11" draw:name="Horizontal Line 207" text:anchor-type="as-char"><svg:title/><svg:desc/><draw:enhanced-geometry draw:type="non-primitive" svg:viewBox="0 0 21600 21600" draw:enhanced-path="M 0 0 L 21600 0 21600 21600 0 21600 Z N"/></draw:custom-shape></text:span></text:p>
      <text:h text:style-name="P445" text:outline-level="1">VERY IMPORTANT</text:h>
      <text:p text:style-name="P446">Changing:</text:p>
      <text:p text:style-name="P447">amountInput</text:p>
      <text:p text:style-name="P448">changes STATE.</text:p>
      <text:p text:style-name="P449">Compose observes state changes.</text:p>
      <text:p text:style-name="P450">So Compose says:</text:p>
      <text:p text:style-name="P451">"Oh, state changed.</text:p>
      <text:p text:style-name="P452">I must recompose."</text:p>
      <text:p text:style-name="P453"><text:span text:style-name="T454"><draw:custom-shape svg:x="0in" svg:y="0in" svg:width="45.51042in" svg:height="0.00139in" draw:id="id10" draw:style-name="a12" draw:name="Horizontal Line 208" text:anchor-type="as-char"><svg:title/><svg:desc/><draw:enhanced-geometry draw:type="non-primitive" svg:viewBox="0 0 21600 21600" draw:enhanced-path="M 0 0 L 21600 0 21600 21600 0 21600 Z N"/></draw:custom-shape></text:span></text:p>
      <text:h text:style-name="P455" text:outline-level="1">8. Recomposition happens</text:h>
      <text:p text:style-name="P456">Compose reruns:</text:p>
      <text:p text:style-name="P457">TipTimeLayout()</text:p>
      <text:p text:style-name="P458">AGAIN.</text:p>
      <text:p text:style-name="P459">Not whole app.</text:p>
      <text:p text:style-name="P460">Only affected composables.</text:p>
      <text:p text:style-name="P461"><text:span text:style-name="T462"><draw:custom-shape svg:x="0in" svg:y="0in" svg:width="45.51042in" svg:height="0.00139in" draw:id="id11" draw:style-name="a13" draw:name="Horizontal Line 209" text:anchor-type="as-char"><svg:title/><svg:desc/><draw:enhanced-geometry draw:type="non-primitive" svg:viewBox="0 0 21600 21600" draw:enhanced-path="M 0 0 L 21600 0 21600 21600 0 21600 Z N"/></draw:custom-shape></text:span></text:p>
      <text:h text:style-name="P463" text:outline-level="1">9. New values</text:h>
      <text:p text:style-name="P464">Now:</text:p>
      <text:p text:style-name="P465">amountInput = "5"</text:p>
      <text:p text:style-name="P466">Therefore:</text:p>
      <text:p text:style-name="P467">amount = 5.0</text:p>
      <text:p text:style-name="P468">Then:</text:p>
      <text:p text:style-name="P469">tip = 0.75</text:p>
      <text:p text:style-name="P470">Then Text becomes:</text:p>
      <text:p text:style-name="P471">Tip amount: 0.75 €</text:p>
      <text:p text:style-name="P472">UI updates automatically.</text:p>
      <text:p text:style-name="P473"><text:span text:style-name="T474"><draw:custom-shape svg:x="0in" svg:y="0in" svg:width="45.51042in" svg:height="0.00139in" draw:id="id12" draw:style-name="a14" draw:name="Horizontal Line 210" text:anchor-type="as-char"><svg:title/><svg:desc/><draw:enhanced-geometry draw:type="non-primitive" svg:viewBox="0 0 21600 21600" draw:enhanced-path="M 0 0 L 21600 0 21600 21600 0 21600 Z N"/></draw:custom-shape></text:span></text:p>
      <text:h text:style-name="P475" text:outline-level="1">COMPLETE DATA FLOW</text:h>
      <text:p text:style-name="P476">User types</text:p>
      <text:p text:style-name="P477"><text:s text:c="6"/>↓</text:p>
      <text:p text:style-name="P478">TextField calls onValueChange</text:p>
      <text:p text:style-name="P479"><text:s text:c="6"/>↓</text:p>
      <text:p text:style-name="P480">Lambda changes amountInput</text:p>
      <text:p text:style-name="P481"><text:s text:c="6"/>↓</text:p>
      <text:p text:style-name="P482">State changes</text:p>
      <text:p text:style-name="P483"><text:s text:c="6"/>↓</text:p>
      <text:p text:style-name="P484">Compose recomposes</text:p>
      <text:p text:style-name="P485"><text:s text:c="6"/>↓</text:p>
      <text:p text:style-name="P486">Tip recalculated</text:p>
      <text:p text:style-name="P487"><text:s text:c="6"/>↓</text:p>
      <text:p text:style-name="P488">UI updates</text:p>
      <text:p text:style-name="P489">THIS is the heart of Compose.</text:p>
      <text:p text:style-name="P490"><text:span text:style-name="T491"><draw:custom-shape svg:x="0in" svg:y="0in" svg:width="45.51042in" svg:height="0.00139in" draw:id="id13" draw:style-name="a15" draw:name="Horizontal Line 211" text:anchor-type="as-char"><svg:title/><svg:desc/><draw:enhanced-geometry draw:type="non-primitive" svg:viewBox="0 0 21600 21600" draw:enhanced-path="M 0 0 L 21600 0 21600 21600 0 21600 Z N"/></draw:custom-shape></text:span></text:p>
      <text:h text:style-name="P492" text:outline-level="1">MOST IMPORTANT ARCHITECTURAL IDEA</text:h>
      <text:p text:style-name="P493"><text:span text:style-name="T494">Your<text:s/></text:span><text:span text:style-name="T495">EditNumberField()</text:span><text:span text:style-name="T496"><text:s/>does NOT own state anymore.</text:span></text:p>
      <text:p text:style-name="P497">It only:</text:p>
      <text:list text:style-name="LFO3" text:continue-numbering="true">
        <text:list-item>
          <text:p text:style-name="P498">displays value</text:p>
        </text:list-item>
        <text:list-item>
          <text:p text:style-name="P499">notifies changes</text:p>
        </text:list-item>
      </text:list>
      <text:p text:style-name="P500">Parent owns state:</text:p>
      <text:p text:style-name="P501">TipTimeLayout</text:p>
      <text:p text:style-name="P502">This is correct Compose architecture.</text:p>
      <text:p text:style-name="P503"><text:span text:style-name="T504"><draw:custom-shape svg:x="0in" svg:y="0in" svg:width="45.51042in" svg:height="0.00139in" draw:id="id14" draw:style-name="a16" draw:name="Horizontal Line 212" text:anchor-type="as-char"><svg:title/><svg:desc/><draw:enhanced-geometry draw:type="non-primitive" svg:viewBox="0 0 21600 21600" draw:enhanced-path="M 0 0 L 21600 0 21600 21600 0 21600 Z N"/></draw:custom-shape></text:span></text:p>
      <text:h text:style-name="P505" text:outline-level="1">Why this is GOOD</text:h>
      <text:p text:style-name="P506">Because parent now controls everything:</text:p>
      <text:list text:style-name="LFO4" text:continue-numbering="true">
        <text:list-item>
          <text:p text:style-name="P507">calculations</text:p>
        </text:list-item>
        <text:list-item>
          <text:p text:style-name="P508">validation</text:p>
        </text:list-item>
        <text:list-item>
          <text:p text:style-name="P509">saving</text:p>
        </text:list-item>
        <text:list-item>
          <text:p text:style-name="P510">formatting</text:p>
        </text:list-item>
        <text:list-item>
          <text:p text:style-name="P511">business logic</text:p>
        </text:list-item>
      </text:list>
      <text:p text:style-name="P512">Child composable becomes<text:s/>reusable.</text:p>
      <text:p text:style-name="P513">You can now reuse:</text:p>
      <text:p text:style-name="P514">EditNumberField()</text:p>
      <text:p text:style-name="P515">ANYWHERE.</text:p>
      <text:p text:style-name="P516">Because it is stateless.</text:p>
      <text:p text:style-name="P517"/>
      <text:p text:style-name="P518"/>
      <text:p text:style-name="P519"/>
      <text:p text:style-name="P520"/>
      <text:p text:style-name="Normal"><text:span text:style-name="T521">vir:<text:s/></text:span><text:a xlink:href="https://developer.android.com/codelabs/basic-android-kotlin-compose-using-state?continue=https%3A%2F%2Fdeveloper.android.com%2Fcourses%2Fpathways%2Fandroid-basics-compose-unit-2-pathway-3%23codelab-https%3A%2F%2Fdeveloper.android.com%2Fcodelabs%2Fbasic-android-kotlin-compose-using-state#0" office:target-frame-name="_top" xlink:show="replace"><text:span text:style-name="T522">lin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 svg:panose-1="2 11 5 2 4 5 4 2 2 4"/>
    <style:font-face style:name="Roboto Mono" svg:font-family="Roboto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rogramskaKoda" style:display-name="ProgramskaKoda" style:family="paragraph" style:parent-style-name="Normal">
      <style:paragraph-properties fo:border="0.0069in solid #000000" fo:padding-top="0.0138in" fo:padding-left="0.0555in" fo:padding-bottom="0.0138in" fo:padding-right="0.0555in" style:shadow="none" fo:margin-bottom="0in" fo:line-height="115%"/>
      <style:text-properties style:font-name="Courier New" style:font-name-complex="Courier New" fo:font-size="10pt" style:font-size-asian="10pt" style:font-size-complex="10pt" fo:hyphenate="false"/>
    </style:style>
    <style:style style:name="ProgramskaKodaZnak" style:display-name="ProgramskaKoda Znak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šan Fugina</meta:initial-creator>
    <dc:creator>Dušan Fugina</dc:creator>
    <meta:creation-date>2026-05-26T12:38:00Z</meta:creation-date>
    <dc:date>2026-05-28T16:25:00Z</dc:date>
    <meta:template xlink:href="Normal.dotm" xlink:type="simple"/>
    <meta:editing-cycles>18</meta:editing-cycles>
    <meta:editing-duration>PT15180S</meta:editing-duration>
    <meta:document-statistic meta:page-count="1" meta:paragraph-count="15" meta:word-count="1164" meta:character-count="7785" meta:row-count="55" meta:non-whitespace-character-count="6636"/>
  </office:meta>
</office:document-meta>
</file>